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Serif_4.ttf" manifest:media-type="application/x-font-ttf"/>
  <manifest:file-entry manifest:full-path="Fonts/Font_Liberation_Mono_2.ttf" manifest:media-type="application/x-font-ttf"/>
  <manifest:file-entry manifest:full-path="Fonts/Font_Liberation_Serif_3.ttf" manifest:media-type="application/x-font-ttf"/>
  <manifest:file-entry manifest:full-path="Fonts/Font_Liberation_Mono_1.ttf" manifest:media-type="application/x-font-ttf"/>
  <manifest:file-entry manifest:full-path="Pictures/10000001000002B300000184829E2970A48B34BA.png" manifest:media-type="image/png"/>
  <manifest:file-entry manifest:full-path="Pictures/10000000000003200000025814364206BE6C10C8.png" manifest:media-type="image/png"/>
  <manifest:file-entry manifest:full-path="Pictures/100000000000032000000258CEF33E6E638019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be015" officeooo:paragraph-rsid="00132876" style:font-size-asian="10pt" style:font-size-complex="10pt"/>
    </style:style>
    <style:style style:name="P2" style:family="paragraph" style:parent-style-name="Table_20_Contents">
      <style:paragraph-properties fo:line-height="100%"/>
      <style:text-properties style:font-name="Liberation Mono" fo:font-size="10pt" officeooo:rsid="000be015" officeooo:paragraph-rsid="00132876" style:font-size-asian="10pt" style:font-size-complex="10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be015" officeooo:paragraph-rsid="00167438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089406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132876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2bc015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261ee" officeooo:paragraph-rsid="00132876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15955c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2bc015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Liberation Mono" fo:font-size="10pt" officeooo:rsid="0009846b" officeooo:paragraph-rsid="0009846b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Liberation Mono" fo:font-size="10pt" officeooo:rsid="0009846b" officeooo:paragraph-rsid="00132876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Liberation Mono" fo:font-size="10pt" officeooo:paragraph-rsid="00132876" style:font-size-asian="10pt" style:font-size-complex="10pt"/>
    </style:style>
    <style:style style:name="P13" style:family="paragraph" style:parent-style-name="Title">
      <style:paragraph-properties fo:line-height="100%"/>
      <style:text-properties officeooo:rsid="00089406" officeooo:paragraph-rsid="00089406"/>
    </style:style>
    <style:style style:name="P14" style:family="paragraph" style:parent-style-name="Text_20_body">
      <style:paragraph-properties fo:line-height="100%"/>
      <style:text-properties officeooo:rsid="00089406" officeooo:paragraph-rsid="00089406"/>
    </style:style>
    <style:style style:name="P15" style:family="paragraph" style:parent-style-name="Text_20_body">
      <style:paragraph-properties fo:line-height="100%"/>
      <style:text-properties officeooo:rsid="0009846b" officeooo:paragraph-rsid="0009846b"/>
    </style:style>
    <style:style style:name="P16" style:family="paragraph" style:parent-style-name="Text_20_body">
      <style:paragraph-properties fo:line-height="100%"/>
      <style:text-properties officeooo:rsid="000be015" officeooo:paragraph-rsid="000be015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paragraph-properties fo:line-height="100%"/>
      <style:text-properties style:font-name="Liberation Serif" officeooo:rsid="0009846b" officeooo:paragraph-rsid="0009846b"/>
    </style:style>
    <style:style style:name="P19" style:family="paragraph" style:parent-style-name="Text_20_body">
      <style:paragraph-properties fo:line-height="100%"/>
      <style:text-properties officeooo:rsid="000d6bdb" officeooo:paragraph-rsid="000d6bdb"/>
    </style:style>
    <style:style style:name="P20" style:family="paragraph" style:parent-style-name="Text_20_body">
      <style:paragraph-properties fo:line-height="100%"/>
      <style:text-properties fo:font-weight="bold" officeooo:rsid="000d6bdb" officeooo:paragraph-rsid="000d6bdb" style:font-weight-asian="bold" style:font-weight-complex="bold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0f1bef" officeooo:paragraph-rsid="0017abce"/>
    </style:style>
    <style:style style:name="P22" style:family="paragraph" style:parent-style-name="Text_20_body">
      <style:paragraph-properties fo:line-height="100%"/>
      <style:text-properties officeooo:rsid="0015955c" officeooo:paragraph-rsid="0015955c"/>
    </style:style>
    <style:style style:name="P23" style:family="paragraph" style:parent-style-name="Text_20_body">
      <style:paragraph-properties fo:line-height="100%"/>
      <style:text-properties officeooo:rsid="000bff0f" officeooo:paragraph-rsid="000bff0f"/>
    </style:style>
    <style:style style:name="P24" style:family="paragraph" style:parent-style-name="Text_20_body">
      <style:paragraph-properties fo:line-height="100%" fo:text-align="center" style:justify-single-word="false"/>
      <style:text-properties officeooo:rsid="000bff0f" officeooo:paragraph-rsid="000bff0f"/>
    </style:style>
    <style:style style:name="P25" style:family="paragraph" style:parent-style-name="Text_20_body">
      <style:paragraph-properties fo:line-height="100%"/>
      <style:text-properties officeooo:rsid="000eb01a" officeooo:paragraph-rsid="000eb01a"/>
    </style:style>
    <style:style style:name="P26" style:family="paragraph" style:parent-style-name="Text_20_body">
      <style:paragraph-properties fo:line-height="100%"/>
      <style:text-properties fo:font-style="italic" officeooo:rsid="001bab53" officeooo:paragraph-rsid="001bab53" style:font-style-asian="italic" style:font-style-complex="italic"/>
    </style:style>
    <style:style style:name="P27" style:family="paragraph" style:parent-style-name="Text_20_body">
      <style:paragraph-properties fo:line-height="100%"/>
      <style:text-properties officeooo:rsid="00178fca" officeooo:paragraph-rsid="002bc015"/>
    </style:style>
    <style:style style:name="P28" style:family="paragraph" style:parent-style-name="Text_20_body">
      <style:paragraph-properties fo:line-height="100%"/>
      <style:text-properties officeooo:rsid="002bc015" officeooo:paragraph-rsid="002bc015"/>
    </style:style>
    <style:style style:name="P29" style:family="paragraph" style:parent-style-name="Heading_20_1">
      <style:paragraph-properties fo:line-height="100%"/>
      <style:text-properties officeooo:rsid="0009846b" officeooo:paragraph-rsid="0009846b"/>
    </style:style>
    <style:style style:name="P30" style:family="paragraph" style:parent-style-name="Heading_20_1">
      <style:paragraph-properties fo:line-height="100%"/>
      <style:text-properties officeooo:rsid="00089406" officeooo:paragraph-rsid="00089406"/>
    </style:style>
    <style:style style:name="P31" style:family="paragraph" style:parent-style-name="Heading_20_1">
      <style:paragraph-properties fo:line-height="100%"/>
    </style:style>
    <style:style style:name="P32" style:family="paragraph" style:parent-style-name="Heading_20_1">
      <style:paragraph-properties fo:line-height="100%" fo:break-before="page"/>
      <style:text-properties officeooo:paragraph-rsid="000be015"/>
    </style:style>
    <style:style style:name="P33" style:family="paragraph" style:parent-style-name="Heading_20_1">
      <style:paragraph-properties fo:break-before="page"/>
      <style:text-properties officeooo:rsid="0025f791" officeooo:paragraph-rsid="00259820"/>
    </style:style>
    <style:style style:name="P34" style:family="paragraph" style:parent-style-name="Table_20_Contents">
      <style:paragraph-properties fo:line-height="100%"/>
      <style:text-properties style:font-name="Liberation Mono" fo:font-size="10pt" officeooo:rsid="0009846b" officeooo:paragraph-rsid="0033902c" style:font-size-asian="10pt" style:font-size-complex="10pt"/>
    </style:style>
    <style:style style:name="P35" style:family="paragraph" style:parent-style-name="Table_20_Contents">
      <style:paragraph-properties fo:line-height="100%"/>
      <style:text-properties style:font-name="Liberation Mono" fo:font-size="10pt" officeooo:rsid="0009846b" officeooo:paragraph-rsid="00132876" style:font-size-asian="10pt" style:font-size-complex="10pt"/>
    </style:style>
    <style:style style:name="P36" style:family="paragraph" style:parent-style-name="Table_20_Contents">
      <style:paragraph-properties fo:line-height="100%"/>
      <style:text-properties style:font-name="Liberation Mono" fo:font-size="10pt" officeooo:paragraph-rsid="0033902c" style:font-size-asian="10pt" style:font-size-complex="10pt"/>
    </style:style>
    <style:style style:name="P37" style:family="paragraph" style:parent-style-name="Text_20_body">
      <style:paragraph-properties fo:line-height="100%"/>
      <style:text-properties style:font-name="Liberation Serif" officeooo:rsid="000a6ea7" officeooo:paragraph-rsid="000a6ea7"/>
    </style:style>
    <style:style style:name="P38" style:family="paragraph" style:parent-style-name="Text_20_body">
      <style:paragraph-properties fo:line-height="100%"/>
      <style:text-properties style:font-name="Liberation Serif" officeooo:rsid="000a6ea7" officeooo:paragraph-rsid="0033902c"/>
    </style:style>
    <style:style style:name="P39" style:family="paragraph" style:parent-style-name="Text_20_body" style:list-style-name="L1">
      <style:paragraph-properties fo:line-height="100%"/>
      <style:text-properties officeooo:rsid="000d6bdb" officeooo:paragraph-rsid="000d6bdb"/>
    </style:style>
    <style:style style:name="P40" style:family="paragraph" style:parent-style-name="Text_20_body" style:list-style-name="L1">
      <style:paragraph-properties fo:line-height="100%"/>
      <style:text-properties fo:font-weight="bold" officeooo:rsid="000d6bdb" officeooo:paragraph-rsid="000d6bdb" style:font-weight-asian="bold" style:font-weight-complex="bold"/>
    </style:style>
    <style:style style:name="P41" style:family="paragraph" style:parent-style-name="Text_20_body" style:list-style-name="L2">
      <style:paragraph-properties fo:line-height="100%"/>
      <style:text-properties fo:font-weight="bold" officeooo:rsid="000eb01a" officeooo:paragraph-rsid="000eb01a" style:font-weight-asian="bold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15955c" officeooo:paragraph-rsid="002bc015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089406" officeooo:paragraph-rsid="0033902c" style:font-size-asian="10pt" style:font-size-complex="10pt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rsid="0033902c" officeooo:paragraph-rsid="0033902c" style:font-size-asian="10pt" style:font-size-complex="10pt"/>
    </style:style>
    <style:style style:name="P45" style:family="paragraph" style:parent-style-name="Text_20_body">
      <style:paragraph-properties fo:line-height="100%" fo:text-align="center" style:justify-single-word="false"/>
      <style:text-properties officeooo:paragraph-rsid="002f0c40"/>
    </style:style>
    <style:style style:name="P46" style:family="paragraph" style:parent-style-name="Text_20_body">
      <style:paragraph-properties fo:line-height="100%"/>
      <style:text-properties officeooo:paragraph-rsid="0009846b"/>
    </style:style>
    <style:style style:name="P47" style:family="paragraph" style:parent-style-name="Text_20_body">
      <style:paragraph-properties fo:line-height="100%"/>
      <style:text-properties officeooo:rsid="000be015" officeooo:paragraph-rsid="00089406"/>
    </style:style>
    <style:style style:name="T1" style:family="text">
      <style:text-properties officeooo:rsid="0009846b"/>
    </style:style>
    <style:style style:name="T2" style:family="text">
      <style:text-properties officeooo:rsid="000a6ea7"/>
    </style:style>
    <style:style style:name="T3" style:family="text">
      <style:text-properties style:font-name="Liberation Serif" officeooo:rsid="0009846b"/>
    </style:style>
    <style:style style:name="T4" style:family="text">
      <style:text-properties officeooo:rsid="000be015"/>
    </style:style>
    <style:style style:name="T5" style:family="text">
      <style:text-properties officeooo:rsid="000bff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b01a" style:font-weight-asian="normal" style:font-weight-complex="normal"/>
    </style:style>
    <style:style style:name="T9" style:family="text">
      <style:text-properties fo:font-weight="normal" officeooo:rsid="0033902c" style:font-weight-asian="normal" style:font-weight-complex="normal"/>
    </style:style>
    <style:style style:name="T10" style:family="text">
      <style:text-properties officeooo:rsid="00109e0c"/>
    </style:style>
    <style:style style:name="T11" style:family="text">
      <style:text-properties officeooo:rsid="00121f97"/>
    </style:style>
    <style:style style:name="T12" style:family="text">
      <style:text-properties officeooo:rsid="001261ee"/>
    </style:style>
    <style:style style:name="T13" style:family="text">
      <style:text-properties officeooo:rsid="00132876"/>
    </style:style>
    <style:style style:name="T14" style:family="text">
      <style:text-properties officeooo:rsid="0013fe24"/>
    </style:style>
    <style:style style:name="T15" style:family="text">
      <style:text-properties officeooo:rsid="0015955c"/>
    </style:style>
    <style:style style:name="T16" style:family="text">
      <style:text-properties officeooo:rsid="00167438"/>
    </style:style>
    <style:style style:name="T17" style:family="text">
      <style:text-properties officeooo:rsid="00178fca"/>
    </style:style>
    <style:style style:name="T18" style:family="text">
      <style:text-properties officeooo:rsid="0017abce"/>
    </style:style>
    <style:style style:name="T19" style:family="text">
      <style:text-properties officeooo:rsid="001f5f07"/>
    </style:style>
    <style:style style:name="T20" style:family="text">
      <style:text-properties officeooo:rsid="00245a7c"/>
    </style:style>
    <style:style style:name="T21" style:family="text">
      <style:text-properties officeooo:rsid="002723b2"/>
    </style:style>
    <style:style style:name="T22" style:family="text">
      <style:text-properties officeooo:rsid="00290658"/>
    </style:style>
    <style:style style:name="T23" style:family="text">
      <style:text-properties style:font-name="Liberation Mono" fo:font-size="10pt" officeooo:rsid="00089406" style:font-size-asian="10pt" style:font-size-complex="10pt"/>
    </style:style>
    <style:style style:name="T24" style:family="text">
      <style:text-properties officeooo:rsid="002bc015"/>
    </style:style>
    <style:style style:name="T25" style:family="text">
      <style:text-properties officeooo:rsid="000f1bef"/>
    </style:style>
    <style:style style:name="T26" style:family="text">
      <style:text-properties officeooo:rsid="0033902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>D’s </text:span>VM Setup Doc</text:p>
      <text:h text:style-name="P29" text:outline-level="1">Update Your <text:span text:style-name="T4">Local </text:span>Host File</text:h>
      <text:p text:style-name="P15">From your machin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13">$ </text:span>echo "<text:span text:style-name="T19">&lt;cloud VM IP here&gt;</text:span> D-CLOUD" | sudo tee -a /etc/hosts</text:p>
          </table:table-cell>
        </table:table-row>
      </table:table>
      <text:p text:style-name="P15"/>
      <text:p text:style-name="P46"><text:span text:style-name="T1">Replace “D-CLOUD” with any name you want. This is the host name for your cloud PC so you can connect to it from your machine without having to remember the IP.</text:span></text:p>
      <text:h text:style-name="P30" text:outline-level="1">Set <text:span text:style-name="T4">U</text:span>p SSH Server <text:span text:style-name="T26">- Part 1</text:span></text:h>
      <text:p text:style-name="P14">From the <text:span text:style-name="T19">cloud provider's</text:span> conso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3">$ </text:span>apt update</text:p>
            <text:p text:style-name="P5"><text:span text:style-name="T13">$ </text:span>apt install openssh-server ufw -y</text:p>
            <text:p text:style-name="P5"><text:span text:style-name="T13">$ </text:span>systemctl start ssh</text:p>
            <text:p text:style-name="P5"><text:span text:style-name="T13">$ </text:span>systemctl enable ssh</text:p>
            <text:p text:style-name="P5"><text:span text:style-name="T13">$ </text:span>ufw allow ssh</text:p>
            <text:p text:style-name="P5"><text:span text:style-name="T13">$ </text:span>ufw enable</text:p>
            <text:p text:style-name="P5"><text:span text:style-name="T13">$ </text:span>systemctl start ufw</text:p>
            <text:p text:style-name="P5"><text:span text:style-name="T13">$ </text:span>systemctl enable ufw</text:p>
          </table:table-cell>
        </table:table-row>
      </table:table>
      <text:p text:style-name="P17"/>
      <text:p text:style-name="P14">From your machine, <text:span text:style-name="T1">test connecting to your cloud PC via SSH using the password</text:span>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13">$ </text:span>apt update</text:p>
            <text:p text:style-name="P11"><text:span text:style-name="T13">$ </text:span>apt install openssh-client -y</text:p>
            <text:p text:style-name="P11"><text:span text:style-name="T13">$ </text:span>ssh root@D-CLOUD #enter your password</text:p>
            <text:p text:style-name="P11">$ useradd -m -G sudo -s /bin/bash muict<text:span text:style-name="T26"> </text:span></text:p>
            <text:p text:style-name="P11">$ passwd muict #set your non-root password here</text:p>
          </table:table-cell>
        </table:table-row>
      </table:table>
      <text:p text:style-name="P47"/>
      <text:p text:style-name="P15"><text:span text:style-name="T26">F</text:span>rom your machine (out of your SSH session above)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"><text:span text:style-name="T13">$ </text:span><text:span text:style-name="T26">ssh-keygen</text:span></text:p>
            <text:p text:style-name="P34"><text:span text:style-name="T26">$ </text:span>ssh-copy-id <text:span text:style-name="T26">muict</text:span>@D-CLOUD</text:p>
          </table:table-cell>
        </table:table-row>
      </table:table>
      <text:p text:style-name="P15"/>
      <text:p text:style-name="P18">From your active SSH session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13">$ </text:span>nano /etc/ssh/sshd_config</text:p>
          </table:table-cell>
        </table:table-row>
      </table:table>
      <text:p text:style-name="P38">Locate the “PasswordAuthentication” <text:span text:style-name="T26">and "PermitRootLogin" lines and set to:</text:span><text:span text:style-name="T3"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><text:span text:style-name="T13">PasswordAuthentication no</text:span></text:p>
            <text:p text:style-name="P36">PermitRootLogin <text:span text:style-name="T26">no</text:span></text:p>
          </table:table-cell>
        </table:table-row>
      </table:table>
      <text:p text:style-name="P38"><text:span text:style-name="T26">T</text:span>hen<text:span text:style-name="T26">,</text:span> restart the service:<text:span text:style-name="T3"/></text:p>
      <text:p text:style-name="P38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<text:span text:style-name="T13">$ </text:span><text:span text:style-name="T2">systemctl restart ssh</text:span></text:p>
          </table:table-cell>
        </table:table-row>
      </table:table>
      <text:p text:style-name="P37">The SSH server should be all set up<text:span text:style-name="T26"> securely</text:span>, <text:span text:style-name="T4">and you shouldn’t need cloud provider’s console</text:span><text:span text:style-name="T26"> nor the root login</text:span><text:span text:style-name="T4"> anymore, unless there is an emergency</text:span><text:span text:style-name="T26">.</text:span></text:p>
      <text:h text:style-name="P32" text:outline-level="1"><text:span text:style-name="T4">Set Up RDP-Over-SSH</text:span></text:h>
      <text:p text:style-name="P16">From an active SSH session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3">$ </text:span><text:span text:style-name="T26">sudo </text:span><text:span text:style-name="T4">apt update</text:span></text:p>
            <text:p text:style-name="P1"><text:span text:style-name="T13">$ </text:span><text:span text:style-name="T26">sudo </text:span>apt install xrdp jwm -y</text:p>
            <text:p text:style-name="P1"><text:span text:style-name="T13">$ </text:span><text:span text:style-name="T26">sudo </text:span>nano /etc/xrdp/xrdp.ini</text:p>
          </table:table-cell>
        </table:table-row>
      </table:table>
      <text:p text:style-name="P16"/>
      <text:p text:style-name="P16">In the file, locate the line with “port=3389“ and change it to “port=tcp://.:3389”. Then, restart the servic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"><text:span text:style-name="T13">$</text:span><text:span text:style-name="T26"> sudo</text:span><text:span text:style-name="T13"> </text:span>systemctl restart xrdp</text:p>
          </table:table-cell>
        </table:table-row>
      </table:table>
      <text:p text:style-name="P16"/>
      <text:p text:style-name="P16">From your local machin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span text:style-name="T13">$ </text:span><text:span text:style-name="T26">sudo </text:span>apt update</text:p>
            <text:p text:style-name="P2"><text:span text:style-name="T13">$ </text:span><text:span text:style-name="T26">sudo </text:span>apt install remmina -<text:span text:style-name="T5">y</text:span></text:p>
          </table:table-cell>
        </table:table-row>
      </table:table>
      <text:p text:style-name="P16"/>
      <text:p text:style-name="P23">Open Remmina and click the “Add a new connection profile” button top-left of the screen.</text:p>
      <text:p text:style-name="P19">Enter the name of the connection (I use “Cloud PC”). Then in the “Basic” tab, enter:</text:p>
      <text:list text:style-name="L1">
        <text:list-item>
          <text:p text:style-name="P39"><text:span text:style-name="T6">Server:</text:span> localhost:3389</text:p>
        </text:list-item>
        <text:list-item>
          <text:p text:style-name="P40">Username:<text:span text:style-name="T7"> </text:span><text:span text:style-name="T9">muict</text:span></text:p>
        </text:list-item>
        <text:list-item>
          <text:p text:style-name="P40">Password: <text:span text:style-name="T9">the non-root password you set earlier</text:span></text:p>
        </text:list-item>
      </text:list>
      <text:p text:style-name="P20"><text:span text:style-name="T7">In the “SSH Tunnel” tab, </text:span><text:span text:style-name="T8">press the “Enable SSH Tunnel” button, and </text:span><text:span text:style-name="T7">enter:</text:span></text:p>
      <text:list text:style-name="L2">
        <text:list-item>
          <text:p text:style-name="P41">Custom: <text:span text:style-name="T7">D-CLOUD:22</text:span></text:p>
        </text:list-item>
        <text:list-item>
          <text:p text:style-name="P41">Authentication type: <text:span text:style-name="T7">Public key (automatic)</text:span></text:p>
        </text:list-item>
        <text:list-item>
          <text:p text:style-name="P41">Username: <text:span text:style-name="T9">muict</text:span></text:p>
        </text:list-item>
        <text:list-item>
          <text:p text:style-name="P41">SSH private key file: <text:span text:style-name="T7">~/.ssh/id_rsa</text:span></text:p>
        </text:list-item>
      </text:list>
      <text:p text:style-name="P24"><draw:frame draw:style-name="fr2" draw:name="Image2" text:anchor-type="as-char" svg:width="7.999cm" svg:height="6.001cm" draw:z-index="1"><draw:image xlink:href="Pictures/100000000000032000000258CEF33E6E638019BD.png" xlink:type="simple" xlink:show="embed" xlink:actuate="onLoad" draw:mime-type="image/png"/></draw:frame><draw:frame draw:style-name="fr2" draw:name="Image1" text:anchor-type="as-char" svg:width="7.999cm" svg:height="5.99cm" draw:z-index="0"><draw:image xlink:href="Pictures/10000000000003200000025814364206BE6C10C8.png" xlink:type="simple" xlink:show="embed" xlink:actuate="onLoad" draw:mime-type="image/png"/></draw:frame></text:p>
      <text:p text:style-name="P25">Press “Save and Connect”, and it should connect successfully.</text:p>
      <text:p text:style-name="P21"/>
      <text:p text:style-name="P21"><text:soft-page-break/><draw:frame draw:style-name="fr1" draw:name="Image3" text:anchor-type="as-char" svg:width="11.289cm" svg:height="6.338cm" draw:z-index="2"><draw:image xlink:href="Pictures/10000001000002B300000184829E2970A48B34BA.png" xlink:type="simple" xlink:show="embed" xlink:actuate="onLoad" draw:mime-type="image/png"/></draw:frame></text:p>
      <text:p text:style-name="P45"><text:span text:style-name="T25">(If you can see the task bar at the bottom of the screen that’s a success.)</text:span></text:p>
      <text:h text:style-name="P31" text:outline-level="1">Set Up <text:span text:style-name="T10">GUI </text:span><text:span text:style-name="T11">&amp; Software</text:span></text:h>
      <text:p text:style-name="P28">Then run the following commands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<text:span text:style-name="T13">$ </text:span><text:span text:style-name="T26">sudo </text:span><text:span text:style-name="T4">apt update</text:span></text:p>
            <text:p text:style-name="P1"><text:span text:style-name="T13">$ </text:span><text:span text:style-name="T26">sudo </text:span>apt install <text:span text:style-name="T11">lxterminal lxtask pcmanfm firefox-esr l3afpad </text:span><text:span text:style-name="T12">\</text:span></text:p>
            <text:p text:style-name="P3"><text:span text:style-name="T11"><text:s text:c="2"/></text:span><text:span text:style-name="T12">notification-daemon xarchiver </text:span><text:span text:style-name="T14">gnome-icon-theme </text:span><text:span text:style-name="T15">gmrun</text:span><text:span text:style-name="T20"> r</text:span><text:span text:style-name="T21">sync</text:span><text:span text:style-name="T11"> </text:span><text:span text:style-name="T16">\</text:span></text:p>
            <text:p text:style-name="P3"><text:span text:style-name="T16"><text:s text:c="2"/></text:span><text:span text:style-name="T11">fasttrack-archive-keyring</text:span><text:span text:style-name="T16"> fonts-tlwg-laksaman</text:span><text:span text:style-name="T24"> </text:span><text:span text:style-name="T11">-y</text:span></text:p>
            <text:p text:style-name="P1"><text:span text:style-name="T13">$ </text:span><text:span text:style-name="T26">sudo </text:span>update-alternatives --install /usr/bin/x-terminal-emulator <text:span text:style-name="T13">\</text:span></text:p>
            <text:p text:style-name="P1"><text:s text:c="2"/>x-terminal-emulator /usr/bin/lxterminal 100</text:p>
            <text:p text:style-name="P8">$ cd ~</text:p>
            <text:p text:style-name="P7"><text:span text:style-name="T13">$ </text:span><text:span text:style-name="T15">wget https://github.com/gewaleelek/basic-jwm-setup/raw/refs/heads/main/.jwmrc</text:span></text:p>
            <text:p text:style-name="P8">$ mkdir ~/Documents</text:p>
            <text:p text:style-name="P8">$ mkdir ~/Downloads</text:p>
            <text:p text:style-name="P8">$ mkdir ~/Desktop</text:p>
            <text:p text:style-name="P9">$ cp /usr/share/applications/lxterminal.desktop ~/Desktop<text:span text:style-name="T23"/></text:p>
            <text:p text:style-name="P8">$ <text:span text:style-name="T26">sudo </text:span>shutdown -r now # this will restart</text:p>
          </table:table-cell>
        </table:table-row>
      </table:table>
      <text:p text:style-name="P22">After the VM boots up, connect to it via RDP and you should see a better GUI<text:span text:style-name="T24"> and VirtualBox installed.</text:span></text:p>
      <text:p text:style-name="P26">Note: to make it so that the desktop shortcuts don't ask you every time you double click on them, open the File Manager -&gt; Edit -&gt; Preferences -&gt; "Don't ask options on launch executable files"</text:p>
      <text:p text:style-name="P26"/>
      <text:h text:style-name="P33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8:13:47.692267200</meta:creation-date>
    <dc:date>2026-07-03T21:43:48.537293260</dc:date>
    <meta:editing-duration>PT5H44M58S</meta:editing-duration>
    <meta:editing-cycles>36</meta:editing-cycles>
    <meta:generator>LibreOffice/7.4.7.2$Linux_X86_64 LibreOffice_project/40$Build-2</meta:generator>
    <meta:document-statistic meta:table-count="11" meta:image-count="3" meta:object-count="0" meta:page-count="4" meta:paragraph-count="73" meta:word-count="498" meta:character-count="3018" meta:non-whitespace-character-count="2592"/>
  </office:meta>
</office:document-meta>
</file>